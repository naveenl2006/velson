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FF0000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1"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FF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5.662083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8.89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5.60916666666667cm"/>
    </style:style>
    <style:style style:name="co16" style:family="table-column">
      <style:table-column-properties fo:break-before="auto" style:column-width="5.26520833333333cm"/>
    </style:style>
    <style:style style:name="co17" style:family="table-column">
      <style:table-column-properties fo:break-before="auto" style:column-width="3.62479166666667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PREFIX</text:p>
          </table:table-cell>
          <table:table-cell office:value-type="string" table:style-name="ce1">
            <text:p>STARTINGNUMBER</text:p>
          </table:table-cell>
          <table:table-cell office:value-type="string" table:style-name="ce1">
            <text:p>ENDINGNUMBER</text:p>
          </table:table-cell>
          <table:table-cell office:value-type="string" table:style-name="ce1">
            <text:p>NUMBER OF DIGITS</text:p>
          </table:table-cell>
          <table:table-cell office:value-type="string" table:style-name="ce1">
            <text:p>TOTALNUMBERS</text:p>
          </table:table-cell>
          <table:table-cell office:value-type="string" table:style-name="ce1">
            <text:p>NEXT NUMBER OF ENDING NUMBER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T</text:span>OOLS</text:p>
          </table:table-cell>
          <table:table-cell office:value-type="string" table:style-name="ce3">
            <text:p>VT</text:p>
          </table:table-cell>
          <table:table-cell office:value-type="float" office:value="10" table:style-name="ce4">
            <text:p>10</text:p>
          </table:table-cell>
          <table:table-cell office:value-type="float" office:value="9999" table:formula="of:= [.I2]-1" table:style-name="ce1">
            <text:p>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2]-[.E2])+1" table:style-name="ce4">
            <text:p>9990</text:p>
          </table:table-cell>
          <table:table-cell office:value-type="float" office:value="10000" table:style-name="ce1">
            <text:p>10000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A</text:span>SSEMBLY</text:p>
          </table:table-cell>
          <table:table-cell office:value-type="string" table:style-name="ce3">
            <text:p>VA%</text:p>
          </table:table-cell>
          <table:table-cell office:value-type="float" office:value="10010" table:formula="of:=10000+[.E2]" table:style-name="ce4">
            <text:p>10010</text:p>
          </table:table-cell>
          <table:table-cell office:value-type="float" office:value="19999" table:formula="of:= [.I3]-1" table:style-name="ce1">
            <text:p>1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3]-[.E3])+1" table:style-name="ce4">
            <text:p>9990</text:p>
          </table:table-cell>
          <table:table-cell office:value-type="float" office:value="20000" table:style-name="ce1">
            <text:p>20000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G</text:span>EAR BOX</text:p>
          </table:table-cell>
          <table:table-cell office:value-type="string" table:style-name="ce3">
            <text:p>VG</text:p>
          </table:table-cell>
          <table:table-cell office:value-type="float" office:value="20010" table:formula="of:=10000+[.E3]" table:style-name="ce4">
            <text:p>20010</text:p>
          </table:table-cell>
          <table:table-cell office:value-type="float" office:value="29999" table:formula="of:= [.I4]-1" table:style-name="ce1">
            <text:p>2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4]-[.E4])+1" table:style-name="ce4">
            <text:p>9990</text:p>
          </table:table-cell>
          <table:table-cell office:value-type="float" office:value="30000" table:style-name="ce1">
            <text:p>30000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pan text:style-name="T2"><text:s/>C</text:span>YLINDER</text:p>
          </table:table-cell>
          <table:table-cell office:value-type="string" table:style-name="ce3">
            <text:p>VHC</text:p>
          </table:table-cell>
          <table:table-cell office:value-type="float" office:value="30010" table:formula="of:=10000+[.E4]" table:style-name="ce4">
            <text:p>30010</text:p>
          </table:table-cell>
          <table:table-cell office:value-type="float" office:value="39999" table:formula="of:= [.I5]-1" table:style-name="ce1">
            <text:p>3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5]-[.E5])+1" table:style-name="ce4">
            <text:p>9990</text:p>
          </table:table-cell>
          <table:table-cell office:value-type="float" office:value="40000" table:style-name="ce1">
            <text:p>40000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pan text:style-name="T2"><text:s/>P</text:span>UMP</text:p>
          </table:table-cell>
          <table:table-cell office:value-type="string" table:style-name="ce3">
            <text:p>VHP</text:p>
          </table:table-cell>
          <table:table-cell office:value-type="float" office:value="40010" table:formula="of:=10000+[.E5]" table:style-name="ce4">
            <text:p>40010</text:p>
          </table:table-cell>
          <table:table-cell office:value-type="float" office:value="49999" table:formula="of:= [.I6]-1" table:style-name="ce1">
            <text:p>4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6]-[.E6])+1" table:style-name="ce4">
            <text:p>9990</text:p>
          </table:table-cell>
          <table:table-cell office:value-type="float" office:value="50000" table:style-name="ce1">
            <text:p>50000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/><text:span text:style-name="T2">M</text:span>OTOR</text:p>
          </table:table-cell>
          <table:table-cell office:value-type="string" table:style-name="ce3">
            <text:p>VHM</text:p>
          </table:table-cell>
          <table:table-cell office:value-type="float" office:value="50010" table:formula="of:=10000+[.E6]" table:style-name="ce4">
            <text:p>50010</text:p>
          </table:table-cell>
          <table:table-cell office:value-type="float" office:value="59999" table:formula="of:= [.I7]-1" table:style-name="ce1">
            <text:p>5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7]-[.E7])+1" table:style-name="ce4">
            <text:p>9990</text:p>
          </table:table-cell>
          <table:table-cell office:value-type="float" office:value="60000" table:style-name="ce1">
            <text:p>60000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/><text:span text:style-name="T2">V</text:span>ALVE</text:p>
          </table:table-cell>
          <table:table-cell office:value-type="string" table:style-name="ce3">
            <text:p>VHV</text:p>
          </table:table-cell>
          <table:table-cell office:value-type="float" office:value="60010" table:formula="of:=10000+[.E7]" table:style-name="ce4">
            <text:p>60010</text:p>
          </table:table-cell>
          <table:table-cell office:value-type="float" office:value="69999" table:formula="of:= [.I8]-1" table:style-name="ce1">
            <text:p>6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8]-[.E8])+1" table:style-name="ce4">
            <text:p>9990</text:p>
          </table:table-cell>
          <table:table-cell office:value-type="float" office:value="70000" table:style-name="ce1">
            <text:p>70000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E</text:span>LECTRICAL</text:p>
          </table:table-cell>
          <table:table-cell office:value-type="string" table:style-name="ce3">
            <text:p>VE</text:p>
          </table:table-cell>
          <table:table-cell office:value-type="float" office:value="70010" table:formula="of:=10000+[.E8]" table:style-name="ce4">
            <text:p>70010</text:p>
          </table:table-cell>
          <table:table-cell office:value-type="float" office:value="79999" table:formula="of:= [.I9]-1" table:style-name="ce1">
            <text:p>7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9]-[.E9])+1" table:style-name="ce4">
            <text:p>9990</text:p>
          </table:table-cell>
          <table:table-cell office:value-type="float" office:value="80000" table:style-name="ce1">
            <text:p>80000</text:p>
          </table:table-cell>
          <table:table-cell table:number-columns-repeated="1637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/text:p>
          </table:table-cell>
          <table:table-cell office:value-type="string" table:style-name="ce3">
            <text:p>VH</text:p>
          </table:table-cell>
          <table:table-cell office:value-type="float" office:value="80010" table:formula="of:=10000+[.E9]" table:style-name="ce4">
            <text:p>80010</text:p>
          </table:table-cell>
          <table:table-cell office:value-type="float" office:value="89999" table:formula="of:= [.I10]-1" table:style-name="ce1">
            <text:p>8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0]-[.E10])+1" table:style-name="ce4">
            <text:p>9990</text:p>
          </table:table-cell>
          <table:table-cell office:value-type="float" office:value="90000" table:style-name="ce1">
            <text:p>9000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F</text:span>ASTNER</text:p>
          </table:table-cell>
          <table:table-cell office:value-type="string" table:style-name="ce3">
            <text:p>VF</text:p>
          </table:table-cell>
          <table:table-cell office:value-type="float" office:value="90010" table:formula="of:=10000+[.E10]" table:style-name="ce4">
            <text:p>90010</text:p>
          </table:table-cell>
          <table:table-cell office:value-type="float" office:value="99999" table:formula="of:= [.I11]-1" table:style-name="ce1">
            <text:p>9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1]-[.E11])+1" table:style-name="ce4">
            <text:p>9990</text:p>
          </table:table-cell>
          <table:table-cell office:value-type="float" office:value="100000" table:style-name="ce1">
            <text:p>100000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MMON</text:p>
          </table:table-cell>
          <table:table-cell office:value-type="string" table:style-name="ce3">
            <text:p>VC</text:p>
          </table:table-cell>
          <table:table-cell office:value-type="float" office:value="100010" table:formula="of:=10000+[.E11]" table:style-name="ce4">
            <text:p>100010</text:p>
          </table:table-cell>
          <table:table-cell office:value-type="float" office:value="199999" table:formula="of:= [.I12]-1" table:style-name="ce1">
            <text:p>1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2]-[.E12])+1" table:style-name="ce4">
            <text:p>99990</text:p>
          </table:table-cell>
          <table:table-cell office:value-type="float" office:value="200000" table:style-name="ce1">
            <text:p>200000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2-I<text:s/><text:span text:style-name="T2">M</text:span>YRMAX</text:p>
          </table:table-cell>
          <table:table-cell office:value-type="string" table:style-name="ce3">
            <text:p>VM</text:p>
          </table:table-cell>
          <table:table-cell office:value-type="float" office:value="200010" table:formula="of:=100000+[.E12]" table:style-name="ce4">
            <text:p>200010</text:p>
          </table:table-cell>
          <table:table-cell office:value-type="float" office:value="299999" table:formula="of:= [.I13]-1" table:style-name="ce1">
            <text:p>2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3]-[.E13])+1" table:style-name="ce4">
            <text:p>99990</text:p>
          </table:table-cell>
          <table:table-cell office:value-type="float" office:value="300000" table:style-name="ce1">
            <text:p>300000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2-<text:span text:style-name="T2">M</text:span>YRMAX -GEARBOX MODEL</text:p>
          </table:table-cell>
          <table:table-cell office:value-type="string" table:style-name="ce3">
            <text:p>VM</text:p>
          </table:table-cell>
          <table:table-cell office:value-type="float" office:value="1200010" table:style-name="ce4">
            <text:p>1200010</text:p>
          </table:table-cell>
          <table:table-cell office:value-type="float" office:value="1299999" table:formula="of:= [.I14]-1" table:style-name="ce1">
            <text:p>1299999</text:p>
          </table:table-cell>
          <table:table-cell office:value-type="float" office:value="7" table:style-name="ce1">
            <text:p>7</text:p>
          </table:table-cell>
          <table:table-cell office:value-type="float" office:value="99990" table:formula="of:=([.F14]-[.E14])+1" table:style-name="ce4">
            <text:p>99990</text:p>
          </table:table-cell>
          <table:table-cell office:value-type="float" office:value="1300000" table:style-name="ce1">
            <text:p>1300000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3 -<text:s/><text:span text:style-name="T2">C</text:span>I<text:span text:style-name="T2">S</text:span>ADA</text:p>
          </table:table-cell>
          <table:table-cell office:value-type="string" table:style-name="ce3">
            <text:p>VCS</text:p>
          </table:table-cell>
          <table:table-cell office:value-type="float" office:value="300010" table:formula="of:=100000+[.E13]" table:style-name="ce4">
            <text:p>300010</text:p>
          </table:table-cell>
          <table:table-cell office:value-type="float" office:value="399999" table:formula="of:= [.I15]-1" table:style-name="ce1">
            <text:p>3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5]-[.E15])+1" table:style-name="ce4">
            <text:p>99990</text:p>
          </table:table-cell>
          <table:table-cell office:value-type="float" office:value="400000" table:style-name="ce1">
            <text:p>400000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4 -<text:s/><text:span text:style-name="T2">M</text:span>INI<text:s/><text:span text:style-name="T2">M</text:span>YRMAX</text:p>
          </table:table-cell>
          <table:table-cell office:value-type="string" table:style-name="ce3">
            <text:p>VMM</text:p>
          </table:table-cell>
          <table:table-cell office:value-type="float" office:value="400010" table:formula="of:=100000+[.E15]" table:style-name="ce4">
            <text:p>400010</text:p>
          </table:table-cell>
          <table:table-cell office:value-type="float" office:value="499999" table:formula="of:= [.I16]-1" table:style-name="ce1">
            <text:p>4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6]-[.E16])+1" table:style-name="ce4">
            <text:p>99990</text:p>
          </table:table-cell>
          <table:table-cell office:value-type="float" office:value="500000" table:style-name="ce1">
            <text:p>500000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RE<text:s/><text:span text:style-name="T2">D</text:span>RILL</text:p>
          </table:table-cell>
          <table:table-cell office:value-type="string" table:style-name="ce3">
            <text:p>VCD</text:p>
          </table:table-cell>
          <table:table-cell office:value-type="float" office:value="500010" table:formula="of:=100000+[.E16]" table:style-name="ce4">
            <text:p>500010</text:p>
          </table:table-cell>
          <table:table-cell office:value-type="float" office:value="519999" table:formula="of:= [.I17]-1" table:style-name="ce1">
            <text:p>519999</text:p>
          </table:table-cell>
          <table:table-cell office:value-type="float" office:value="6" table:style-name="ce1">
            <text:p>6</text:p>
          </table:table-cell>
          <table:table-cell office:value-type="float" office:value="19990" table:formula="of:=([.F17]-[.E17])+1" table:style-name="ce4">
            <text:p>19990</text:p>
          </table:table-cell>
          <table:table-cell office:value-type="float" office:value="520000" table:style-name="ce4">
            <text:p>52000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RE<text:s/><text:span text:style-name="T2">D</text:span>RILL-MINICORE -CR30</text:p>
          </table:table-cell>
          <table:table-cell office:value-type="string" table:style-name="ce3">
            <text:p>VCD</text:p>
          </table:table-cell>
          <table:table-cell office:value-type="float" office:value="520010" table:style-name="ce4">
            <text:p>520010</text:p>
          </table:table-cell>
          <table:table-cell office:value-type="float" office:value="529999" table:formula="of:= [.I18]-1" table:style-name="ce1">
            <text:p>529999</text:p>
          </table:table-cell>
          <table:table-cell office:value-type="float" office:value="6" table:style-name="ce1">
            <text:p>6</text:p>
          </table:table-cell>
          <table:table-cell office:value-type="float" office:value="9990" table:formula="of:=([.F18]-[.E18])+1" table:style-name="ce4">
            <text:p>9990</text:p>
          </table:table-cell>
          <table:table-cell office:value-type="float" office:value="530000" table:style-name="ce1">
            <text:p>530000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RC</text:span>-REVERSE CIRCULATION</text:p>
          </table:table-cell>
          <table:table-cell office:value-type="string" table:style-name="ce3">
            <text:p>VRC</text:p>
          </table:table-cell>
          <table:table-cell office:value-type="float" office:value="600010" table:formula="of:=100000+[.E17]" table:style-name="ce4">
            <text:p>600010</text:p>
          </table:table-cell>
          <table:table-cell office:value-type="float" office:value="699999" table:formula="of:= [.I19]-1" table:style-name="ce1">
            <text:p>6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9]-[.E19])+1" table:style-name="ce4">
            <text:p>99990</text:p>
          </table:table-cell>
          <table:table-cell office:value-type="float" office:value="700000" table:style-name="ce1">
            <text:p>700000</text:p>
          </table:table-cell>
          <table:table-cell table:number-columns-repeated="16375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6">
            <text:p>VEHICLE MODELS</text:p>
          </table:table-cell>
          <table:table-cell office:value-type="string" table:style-name="ce7">
            <text:p>V7</text:p>
          </table:table-cell>
          <table:table-cell office:value-type="string" table:style-name="ce7">
            <text:p>V% (VE)</text:p>
          </table:table-cell>
          <table:table-cell office:value-type="float" office:value="700010" table:formula="of:=100000+[.E19]" table:style-name="ce8">
            <text:p>700010</text:p>
          </table:table-cell>
          <table:table-cell office:value-type="float" office:value="799999" table:formula="of:= [.I20]-1" table:style-name="ce6">
            <text:p>799999</text:p>
          </table:table-cell>
          <table:table-cell office:value-type="float" office:value="6" table:style-name="ce6">
            <text:p>6</text:p>
          </table:table-cell>
          <table:table-cell office:value-type="float" office:value="99990" table:formula="of:=([.F20]-[.E20])+1" table:style-name="ce8">
            <text:p>99990</text:p>
          </table:table-cell>
          <table:table-cell office:value-type="float" office:value="800000" table:style-name="ce6">
            <text:p>800000</text:p>
          </table:table-cell>
          <table:table-cell table:number-columns-repeated="16375" table:style-name="ce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V1</text:span><text:s/>-<text:s/><text:span text:style-name="T2">M</text:span>YRMAX</text:p>
          </table:table-cell>
          <table:table-cell office:value-type="string" table:style-name="ce3">
            <text:p>VOM</text:p>
          </table:table-cell>
          <table:table-cell office:value-type="float" office:value="800010" table:formula="of:=100000+[.E20]" table:style-name="ce4">
            <text:p>800010</text:p>
          </table:table-cell>
          <table:table-cell office:value-type="float" office:value="899999" table:formula="of:= [.I21]-1" table:style-name="ce1">
            <text:p>8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1]-[.E21])+1" table:style-name="ce4">
            <text:p>99990</text:p>
          </table:table-cell>
          <table:table-cell office:value-type="float" office:value="900000" table:style-name="ce1">
            <text:p>900000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9 -<text:span text:style-name="T2">C</text:span>ISADA<text:s/><text:span text:style-name="T2">V</text:span>+</text:p>
          </table:table-cell>
          <table:table-cell office:value-type="string" table:style-name="ce3">
            <text:p>VCV</text:p>
          </table:table-cell>
          <table:table-cell office:value-type="float" office:value="900010" table:formula="of:=100000+[.E21]" table:style-name="ce4">
            <text:p>900010</text:p>
          </table:table-cell>
          <table:table-cell office:value-type="float" office:value="999999" table:formula="of:= [.I22]-1" table:style-name="ce1">
            <text:p>9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2]-[.E22])+1" table:style-name="ce4">
            <text:p>99990</text:p>
          </table:table-cell>
          <table:table-cell office:value-type="float" office:value="1000000" table:style-name="ce1">
            <text:p>1000000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10 -<text:s/><text:span text:style-name="T2">G</text:span>ROUND<text:s/><text:span text:style-name="T2">H</text:span>OG</text:p>
          </table:table-cell>
          <table:table-cell office:value-type="string" table:style-name="ce3">
            <text:p>VGH</text:p>
          </table:table-cell>
          <table:table-cell office:value-type="float" office:value="1000010" table:formula="of:=100000+[.E22]" table:style-name="ce4">
            <text:p>1000010</text:p>
          </table:table-cell>
          <table:table-cell office:value-type="float" office:value="1099999" table:formula="of:= [.I23]-1" table:style-name="ce1">
            <text:p>1099999</text:p>
          </table:table-cell>
          <table:table-cell office:value-type="float" office:value="7" table:style-name="ce1">
            <text:p>7</text:p>
          </table:table-cell>
          <table:table-cell office:value-type="float" office:value="99990" table:formula="of:=([.F23]-[.E23])+1" table:style-name="ce4">
            <text:p>99990</text:p>
          </table:table-cell>
          <table:table-cell office:value-type="float" office:value="1100000" table:style-name="ce1">
            <text:p>1100000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LASER CUTTING OS</text:p>
          </table:table-cell>
          <table:table-cell office:value-type="string" table:style-name="ce9">
            <text:p>VLC</text:p>
          </table:table-cell>
          <table:table-cell office:value-type="float" office:value="7000000" table:style-name="ce4">
            <text:p>7000000</text:p>
          </table:table-cell>
          <table:table-cell office:value-type="float" office:value="7999999" table:formula="of:= [.I24]-1" table:style-name="ce1">
            <text:p>7999999</text:p>
          </table:table-cell>
          <table:table-cell office:value-type="float" office:value="7" table:style-name="ce1">
            <text:p>7</text:p>
          </table:table-cell>
          <table:table-cell office:value-type="float" office:value="1000000" table:formula="of:=([.F24]-[.E24])+1" table:style-name="ce4">
            <text:p>1000000</text:p>
          </table:table-cell>
          <table:table-cell office:value-type="float" office:value="8000000" table:style-name="ce4">
            <text:p>8000000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C</text:span>USTOMER<text:s/><text:span text:style-name="T2">R</text:span>EQUIREMENT</text:p>
          </table:table-cell>
          <table:table-cell office:value-type="string" table:style-name="ce9">
            <text:p>VCR</text:p>
          </table:table-cell>
          <table:table-cell office:value-type="float" office:value="2000010" table:style-name="ce4">
            <text:p>2000010</text:p>
          </table:table-cell>
          <table:table-cell office:value-type="float" office:value="2999999" table:formula="of:= [.I25]-1" table:style-name="ce1">
            <text:p>2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25]-[.E25])+1" table:style-name="ce4">
            <text:p>999990</text:p>
          </table:table-cell>
          <table:table-cell office:value-type="float" office:value="3000000" table:style-name="ce1">
            <text:p>3000000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R</text:span>AW<text:s/><text:span text:style-name="T2">M</text:span>ATERIAL</text:p>
          </table:table-cell>
          <table:table-cell office:value-type="string" table:style-name="ce9">
            <text:p>VRM</text:p>
          </table:table-cell>
          <table:table-cell office:value-type="float" office:value="3000010" table:style-name="ce4">
            <text:p>3000010</text:p>
          </table:table-cell>
          <table:table-cell office:value-type="float" office:value="3999999" table:formula="of:= [.I26]-1" table:style-name="ce1">
            <text:p>3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26]-[.E26])+1" table:style-name="ce4">
            <text:p>999990</text:p>
          </table:table-cell>
          <table:table-cell office:value-type="float" office:value="4000000" table:style-name="ce1">
            <text:p>4000000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O</text:span>UT<text:span text:style-name="T2">S</text:span>OURCE</text:p>
          </table:table-cell>
          <table:table-cell office:value-type="string" table:style-name="ce9">
            <text:p>VOS</text:p>
          </table:table-cell>
          <table:table-cell office:value-type="float" office:value="4000010" table:style-name="ce4">
            <text:p>4000010</text:p>
          </table:table-cell>
          <table:table-cell office:value-type="float" office:value="4999999" table:formula="of:= [.I27]-1" table:style-name="ce1">
            <text:p>4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27]-[.E27])+1" table:style-name="ce4">
            <text:p>999990</text:p>
          </table:table-cell>
          <table:table-cell office:value-type="float" office:value="5000000" table:style-name="ce1">
            <text:p>5000000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A</text:span>CCES<text:span text:style-name="T2">S</text:span>ORIES</text:p>
          </table:table-cell>
          <table:table-cell office:value-type="string" table:style-name="ce9">
            <text:p>VAC</text:p>
          </table:table-cell>
          <table:table-cell office:value-type="float" office:value="5000010" table:style-name="ce4">
            <text:p>5000010</text:p>
          </table:table-cell>
          <table:table-cell office:value-type="float" office:value="5999999" table:formula="of:= [.I28]-1" table:style-name="ce1">
            <text:p>5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28]-[.E28])+1" table:style-name="ce4">
            <text:p>999990</text:p>
          </table:table-cell>
          <table:table-cell office:value-type="float" office:value="6000000" table:style-name="ce1">
            <text:p>6000000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PREFIX</text:p>
          </table:table-cell>
          <table:table-cell office:value-type="string" table:style-name="ce1">
            <text:p>STARTINGNUMBER</text:p>
          </table:table-cell>
          <table:table-cell office:value-type="string" table:style-name="ce1">
            <text:p>ENDINGNUMBER</text:p>
          </table:table-cell>
          <table:table-cell office:value-type="string" table:style-name="ce1">
            <text:p>NUMBER OF DIGITS</text:p>
          </table:table-cell>
          <table:table-cell office:value-type="string" table:style-name="ce1">
            <text:p>TOTALNUMBERS</text:p>
          </table:table-cell>
          <table:table-cell office:value-type="string" table:style-name="ce1">
            <text:p>NEXT NUMBER OF ENDING NUMBER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T</text:span>OOLS</text:p>
          </table:table-cell>
          <table:table-cell office:value-type="string" table:style-name="ce3">
            <text:p>VT</text:p>
          </table:table-cell>
          <table:table-cell office:value-type="float" office:value="10" table:style-name="ce4">
            <text:p>10</text:p>
          </table:table-cell>
          <table:table-cell office:value-type="float" office:value="9999" table:formula="of:= [.I2]-1" table:style-name="ce1">
            <text:p>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2]-[.E2])+1" table:style-name="ce4">
            <text:p>9990</text:p>
          </table:table-cell>
          <table:table-cell office:value-type="float" office:value="10000" table:style-name="ce1">
            <text:p>10000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A</text:span>SSEMBLY</text:p>
          </table:table-cell>
          <table:table-cell office:value-type="string" table:style-name="ce3">
            <text:p>VAMW</text:p>
          </table:table-cell>
          <table:table-cell office:value-type="float" office:value="10010" table:formula="of:=10010" table:style-name="ce4">
            <text:p>10010</text:p>
          </table:table-cell>
          <table:table-cell office:value-type="float" office:value="19999" table:formula="of:= [.I3]-1" table:style-name="ce1">
            <text:p>1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3]-[.E3])+1" table:style-name="ce4">
            <text:p>9990</text:p>
          </table:table-cell>
          <table:table-cell office:value-type="float" office:value="20000" table:style-name="ce1">
            <text:p>20000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A</text:span>SSEMBLY</text:p>
          </table:table-cell>
          <table:table-cell office:value-type="string" table:style-name="ce3">
            <text:p>VAWP</text:p>
          </table:table-cell>
          <table:table-cell office:value-type="float" office:value="10010" table:formula="of:=10010" table:style-name="ce4">
            <text:p>10010</text:p>
          </table:table-cell>
          <table:table-cell office:value-type="float" office:value="19999" table:formula="of:= [.I4]-1" table:style-name="ce1">
            <text:p>1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4]-[.E4])+1" table:style-name="ce4">
            <text:p>9990</text:p>
          </table:table-cell>
          <table:table-cell office:value-type="float" office:value="20000" table:style-name="ce1">
            <text:p>20000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A</text:span>SSEMBLY</text:p>
          </table:table-cell>
          <table:table-cell office:value-type="string" table:style-name="ce3">
            <text:p>VAWS</text:p>
          </table:table-cell>
          <table:table-cell office:value-type="float" office:value="10010" table:formula="of:=10010" table:style-name="ce4">
            <text:p>10010</text:p>
          </table:table-cell>
          <table:table-cell office:value-type="float" office:value="19999" table:formula="of:= [.I5]-1" table:style-name="ce1">
            <text:p>1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5]-[.E5])+1" table:style-name="ce4">
            <text:p>9990</text:p>
          </table:table-cell>
          <table:table-cell office:value-type="float" office:value="20000" table:style-name="ce1">
            <text:p>20000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A</text:span>SSEMBLY</text:p>
          </table:table-cell>
          <table:table-cell office:value-type="string" table:style-name="ce3">
            <text:p>VAWSR</text:p>
          </table:table-cell>
          <table:table-cell office:value-type="float" office:value="10010" table:formula="of:=10010" table:style-name="ce4">
            <text:p>10010</text:p>
          </table:table-cell>
          <table:table-cell office:value-type="float" office:value="19999" table:formula="of:= [.I6]-1" table:style-name="ce1">
            <text:p>1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6]-[.E6])+1" table:style-name="ce4">
            <text:p>9990</text:p>
          </table:table-cell>
          <table:table-cell office:value-type="float" office:value="20000" table:style-name="ce1">
            <text:p>20000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G</text:span>EAR BOX</text:p>
          </table:table-cell>
          <table:table-cell office:value-type="string" table:style-name="ce3">
            <text:p>VG</text:p>
          </table:table-cell>
          <table:table-cell office:value-type="float" office:value="20010" table:formula="of:=10000+[.E3]" table:style-name="ce4">
            <text:p>20010</text:p>
          </table:table-cell>
          <table:table-cell office:value-type="float" office:value="29999" table:formula="of:= [.I7]-1" table:style-name="ce1">
            <text:p>2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7]-[.E7])+1" table:style-name="ce4">
            <text:p>9990</text:p>
          </table:table-cell>
          <table:table-cell office:value-type="float" office:value="30000" table:style-name="ce1">
            <text:p>30000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pan text:style-name="T2"><text:s/>C</text:span>YLINDER</text:p>
          </table:table-cell>
          <table:table-cell office:value-type="string" table:style-name="ce3">
            <text:p>VHC</text:p>
          </table:table-cell>
          <table:table-cell office:value-type="float" office:value="30010" table:formula="of:=10000+[.E7]" table:style-name="ce4">
            <text:p>30010</text:p>
          </table:table-cell>
          <table:table-cell office:value-type="float" office:value="39999" table:formula="of:= [.I8]-1" table:style-name="ce1">
            <text:p>3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8]-[.E8])+1" table:style-name="ce4">
            <text:p>9990</text:p>
          </table:table-cell>
          <table:table-cell office:value-type="float" office:value="40000" table:style-name="ce1">
            <text:p>40000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pan text:style-name="T2"><text:s/>P</text:span>UMP</text:p>
          </table:table-cell>
          <table:table-cell office:value-type="string" table:style-name="ce3">
            <text:p>VHP</text:p>
          </table:table-cell>
          <table:table-cell office:value-type="float" office:value="40010" table:formula="of:=10000+[.E8]" table:style-name="ce4">
            <text:p>40010</text:p>
          </table:table-cell>
          <table:table-cell office:value-type="float" office:value="49999" table:formula="of:= [.I9]-1" table:style-name="ce1">
            <text:p>4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9]-[.E9])+1" table:style-name="ce4">
            <text:p>9990</text:p>
          </table:table-cell>
          <table:table-cell office:value-type="float" office:value="50000" table:style-name="ce1">
            <text:p>50000</text:p>
          </table:table-cell>
          <table:table-cell table:number-columns-repeated="1637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/><text:span text:style-name="T2">M</text:span>OTOR</text:p>
          </table:table-cell>
          <table:table-cell office:value-type="string" table:style-name="ce3">
            <text:p>VHM</text:p>
          </table:table-cell>
          <table:table-cell office:value-type="float" office:value="50010" table:formula="of:=10000+[.E9]" table:style-name="ce4">
            <text:p>50010</text:p>
          </table:table-cell>
          <table:table-cell office:value-type="float" office:value="59999" table:formula="of:= [.I10]-1" table:style-name="ce1">
            <text:p>5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0]-[.E10])+1" table:style-name="ce4">
            <text:p>9990</text:p>
          </table:table-cell>
          <table:table-cell office:value-type="float" office:value="60000" table:style-name="ce1">
            <text:p>6000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table:style-name="ce3"/>
          <table:table-cell office:value-type="string" table:style-name="ce3">
            <text:p>VEM</text:p>
          </table:table-cell>
          <table:table-cell office:value-type="float" office:value="50010" table:style-name="ce4">
            <text:p>50010</text:p>
          </table:table-cell>
          <table:table-cell office:value-type="float" office:value="59999" table:formula="of:= [.I11]-1" table:style-name="ce1">
            <text:p>5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1]-[.E11])+1" table:style-name="ce4">
            <text:p>9990</text:p>
          </table:table-cell>
          <table:table-cell office:value-type="float" office:value="60000" table:style-name="ce1">
            <text:p>60000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text:s/><text:span text:style-name="T2">V</text:span>ALVE</text:p>
          </table:table-cell>
          <table:table-cell office:value-type="string" table:style-name="ce3">
            <text:p>VHV</text:p>
          </table:table-cell>
          <table:table-cell office:value-type="float" office:value="60010" table:formula="of:=10000+[.E10]" table:style-name="ce4">
            <text:p>60010</text:p>
          </table:table-cell>
          <table:table-cell office:value-type="float" office:value="69999" table:formula="of:= [.I12]-1" table:style-name="ce1">
            <text:p>6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2]-[.E12])+1" table:style-name="ce4">
            <text:p>9990</text:p>
          </table:table-cell>
          <table:table-cell office:value-type="float" office:value="70000" table:style-name="ce1">
            <text:p>70000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E</text:span>LECTRICAL</text:p>
          </table:table-cell>
          <table:table-cell office:value-type="string" table:style-name="ce3">
            <text:p>VE</text:p>
          </table:table-cell>
          <table:table-cell office:value-type="float" office:value="70010" table:formula="of:=10000+[.E12]" table:style-name="ce4">
            <text:p>70010</text:p>
          </table:table-cell>
          <table:table-cell office:value-type="float" office:value="79999" table:formula="of:= [.I13]-1" table:style-name="ce1">
            <text:p>7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3]-[.E13])+1" table:style-name="ce4">
            <text:p>9990</text:p>
          </table:table-cell>
          <table:table-cell office:value-type="float" office:value="80000" table:style-name="ce1">
            <text:p>80000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H</text:span>YDRAULIC</text:p>
          </table:table-cell>
          <table:table-cell office:value-type="string" table:style-name="ce3">
            <text:p>VH</text:p>
          </table:table-cell>
          <table:table-cell office:value-type="float" office:value="80010" table:formula="of:=10000+[.E13]" table:style-name="ce4">
            <text:p>80010</text:p>
          </table:table-cell>
          <table:table-cell office:value-type="float" office:value="89999" table:formula="of:= [.I14]-1" table:style-name="ce1">
            <text:p>8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4]-[.E14])+1" table:style-name="ce4">
            <text:p>9990</text:p>
          </table:table-cell>
          <table:table-cell office:value-type="float" office:value="90000" table:style-name="ce1">
            <text:p>90000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TORE</text:p>
          </table:table-cell>
          <table:table-cell office:value-type="string" table:style-name="ce3">
            <text:p><text:span text:style-name="T2">F</text:span>ASTNER</text:p>
          </table:table-cell>
          <table:table-cell office:value-type="string" table:style-name="ce3">
            <text:p>VF</text:p>
          </table:table-cell>
          <table:table-cell office:value-type="float" office:value="90010" table:formula="of:=10000+[.E14]" table:style-name="ce4">
            <text:p>90010</text:p>
          </table:table-cell>
          <table:table-cell office:value-type="float" office:value="99999" table:formula="of:= [.I15]-1" table:style-name="ce1">
            <text:p>99999</text:p>
          </table:table-cell>
          <table:table-cell office:value-type="float" office:value="5" table:style-name="ce1">
            <text:p>5</text:p>
          </table:table-cell>
          <table:table-cell office:value-type="float" office:value="9990" table:formula="of:=([.F15]-[.E15])+1" table:style-name="ce4">
            <text:p>9990</text:p>
          </table:table-cell>
          <table:table-cell office:value-type="float" office:value="100000" table:style-name="ce1">
            <text:p>100000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MMON</text:p>
          </table:table-cell>
          <table:table-cell office:value-type="string" table:style-name="ce3">
            <text:p>VC</text:p>
          </table:table-cell>
          <table:table-cell office:value-type="float" office:value="100010" table:formula="of:=10000+[.E15]" table:style-name="ce4">
            <text:p>100010</text:p>
          </table:table-cell>
          <table:table-cell office:value-type="float" office:value="199999" table:formula="of:= [.I16]-1" table:style-name="ce1">
            <text:p>1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6]-[.E16])+1" table:style-name="ce4">
            <text:p>99990</text:p>
          </table:table-cell>
          <table:table-cell office:value-type="float" office:value="200000" table:style-name="ce1">
            <text:p>20000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1"/>
          <table:table-cell table:style-name="ce3"/>
          <table:table-cell office:value-type="string" table:style-name="ce3">
            <text:p>VAG</text:p>
          </table:table-cell>
          <table:table-cell office:value-type="float" office:value="100010" table:style-name="ce4">
            <text:p>100010</text:p>
          </table:table-cell>
          <table:table-cell office:value-type="float" office:value="199999" table:formula="of:= [.I17]-1" table:style-name="ce1">
            <text:p>1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7]-[.E17])+1" table:style-name="ce4">
            <text:p>99990</text:p>
          </table:table-cell>
          <table:table-cell office:value-type="float" office:value="200000" table:style-name="ce1">
            <text:p>200000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6"/>
          <table:table-cell table:style-name="ce7"/>
          <table:table-cell office:value-type="string" table:style-name="ce7">
            <text:p>VAG</text:p>
          </table:table-cell>
          <table:table-cell office:value-type="float" office:value="200010" table:style-name="ce8">
            <text:p>200010</text:p>
          </table:table-cell>
          <table:table-cell office:value-type="float" office:value="299999" table:style-name="ce6">
            <text:p>299999</text:p>
          </table:table-cell>
          <table:table-cell office:value-type="float" office:value="6" table:style-name="ce6">
            <text:p>6</text:p>
          </table:table-cell>
          <table:table-cell office:value-type="float" office:value="99990" table:formula="of:=([.F18]-[.E18])+1" table:style-name="ce8">
            <text:p>99990</text:p>
          </table:table-cell>
          <table:table-cell office:value-type="float" office:value="200000" table:style-name="ce6">
            <text:p>200000</text:p>
          </table:table-cell>
          <table:table-cell table:number-columns-repeated="16375" table:style-name="ce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2-I<text:s/><text:span text:style-name="T2">M</text:span>YRMAX</text:p>
          </table:table-cell>
          <table:table-cell office:value-type="string" table:style-name="ce3">
            <text:p>VM</text:p>
          </table:table-cell>
          <table:table-cell office:value-type="float" office:value="200010" table:formula="of:=100000+[.E16]" table:style-name="ce4">
            <text:p>200010</text:p>
          </table:table-cell>
          <table:table-cell office:value-type="float" office:value="299999" table:formula="of:= [.I19]-1" table:style-name="ce1">
            <text:p>2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19]-[.E19])+1" table:style-name="ce4">
            <text:p>99990</text:p>
          </table:table-cell>
          <table:table-cell office:value-type="float" office:value="300000" table:style-name="ce1">
            <text:p>300000</text:p>
          </table:table-cell>
          <table:table-cell table:number-columns-repeated="1637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2-<text:span text:style-name="T2">M</text:span>YRMAX -GEARBOX MODEL</text:p>
          </table:table-cell>
          <table:table-cell office:value-type="string" table:style-name="ce3">
            <text:p>VM</text:p>
          </table:table-cell>
          <table:table-cell office:value-type="float" office:value="1200010" table:style-name="ce4">
            <text:p>1200010</text:p>
          </table:table-cell>
          <table:table-cell office:value-type="float" office:value="1299999" table:formula="of:= [.I20]-1" table:style-name="ce1">
            <text:p>1299999</text:p>
          </table:table-cell>
          <table:table-cell office:value-type="float" office:value="7" table:style-name="ce1">
            <text:p>7</text:p>
          </table:table-cell>
          <table:table-cell office:value-type="float" office:value="99990" table:formula="of:=([.F20]-[.E20])+1" table:style-name="ce4">
            <text:p>99990</text:p>
          </table:table-cell>
          <table:table-cell office:value-type="float" office:value="1300000" table:style-name="ce1">
            <text:p>1300000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3 -<text:s/><text:span text:style-name="T2">C</text:span>I<text:span text:style-name="T2">S</text:span>ADA</text:p>
          </table:table-cell>
          <table:table-cell office:value-type="string" table:style-name="ce3">
            <text:p>VCS</text:p>
          </table:table-cell>
          <table:table-cell office:value-type="float" office:value="300010" table:formula="of:=100000+[.E19]" table:style-name="ce4">
            <text:p>300010</text:p>
          </table:table-cell>
          <table:table-cell office:value-type="float" office:value="399999" table:formula="of:= [.I21]-1" table:style-name="ce1">
            <text:p>3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1]-[.E21])+1" table:style-name="ce4">
            <text:p>99990</text:p>
          </table:table-cell>
          <table:table-cell office:value-type="float" office:value="400000" table:style-name="ce1">
            <text:p>400000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table:style-name="ce3"/>
          <table:table-cell office:value-type="string" table:style-name="ce3">
            <text:p>VOT</text:p>
          </table:table-cell>
          <table:table-cell office:value-type="float" office:value="300010" table:style-name="ce4">
            <text:p>300010</text:p>
          </table:table-cell>
          <table:table-cell office:value-type="float" office:value="399999" table:formula="of:= [.I22]-1" table:style-name="ce1">
            <text:p>3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2]-[.E22])+1" table:style-name="ce4">
            <text:p>99990</text:p>
          </table:table-cell>
          <table:table-cell office:value-type="float" office:value="400000" table:style-name="ce1">
            <text:p>400000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4 -<text:s/><text:span text:style-name="T2">M</text:span>INI<text:s/><text:span text:style-name="T2">M</text:span>YRMAX</text:p>
          </table:table-cell>
          <table:table-cell office:value-type="string" table:style-name="ce3">
            <text:p>VMM</text:p>
          </table:table-cell>
          <table:table-cell office:value-type="float" office:value="400010" table:formula="of:=100000+[.E21]" table:style-name="ce4">
            <text:p>400010</text:p>
          </table:table-cell>
          <table:table-cell office:value-type="float" office:value="499999" table:formula="of:= [.I23]-1" table:style-name="ce1">
            <text:p>4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3]-[.E23])+1" table:style-name="ce4">
            <text:p>99990</text:p>
          </table:table-cell>
          <table:table-cell office:value-type="float" office:value="500000" table:style-name="ce1">
            <text:p>500000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RE<text:s/><text:span text:style-name="T2">D</text:span>RILL</text:p>
          </table:table-cell>
          <table:table-cell office:value-type="string" table:style-name="ce3">
            <text:p>VCD</text:p>
          </table:table-cell>
          <table:table-cell office:value-type="float" office:value="500010" table:formula="of:=100000+[.E23]" table:style-name="ce4">
            <text:p>500010</text:p>
          </table:table-cell>
          <table:table-cell office:value-type="float" office:value="519999" table:formula="of:= [.I24]-1" table:style-name="ce1">
            <text:p>519999</text:p>
          </table:table-cell>
          <table:table-cell office:value-type="float" office:value="6" table:style-name="ce1">
            <text:p>6</text:p>
          </table:table-cell>
          <table:table-cell office:value-type="float" office:value="19990" table:formula="of:=([.F24]-[.E24])+1" table:style-name="ce4">
            <text:p>19990</text:p>
          </table:table-cell>
          <table:table-cell office:value-type="float" office:value="520000" table:style-name="ce4">
            <text:p>520000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C</text:span>ORE<text:s/><text:span text:style-name="T2">D</text:span>RILL-MINICORE -CR30</text:p>
          </table:table-cell>
          <table:table-cell office:value-type="string" table:style-name="ce3">
            <text:p>VCD</text:p>
          </table:table-cell>
          <table:table-cell office:value-type="float" office:value="520010" table:style-name="ce4">
            <text:p>520010</text:p>
          </table:table-cell>
          <table:table-cell office:value-type="float" office:value="529999" table:formula="of:= [.I25]-1" table:style-name="ce1">
            <text:p>529999</text:p>
          </table:table-cell>
          <table:table-cell office:value-type="float" office:value="6" table:style-name="ce1">
            <text:p>6</text:p>
          </table:table-cell>
          <table:table-cell office:value-type="float" office:value="9990" table:formula="of:=([.F25]-[.E25])+1" table:style-name="ce4">
            <text:p>9990</text:p>
          </table:table-cell>
          <table:table-cell office:value-type="float" office:value="530000" table:style-name="ce1">
            <text:p>530000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RC</text:span>-REVERSE CIRCULATION</text:p>
          </table:table-cell>
          <table:table-cell office:value-type="string" table:style-name="ce3">
            <text:p>VRC</text:p>
          </table:table-cell>
          <table:table-cell office:value-type="float" office:value="600010" table:formula="of:=100000+[.E24]" table:style-name="ce4">
            <text:p>600010</text:p>
          </table:table-cell>
          <table:table-cell office:value-type="float" office:value="699999" table:formula="of:= [.I26]-1" table:style-name="ce1">
            <text:p>6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6]-[.E26])+1" table:style-name="ce4">
            <text:p>99990</text:p>
          </table:table-cell>
          <table:table-cell office:value-type="float" office:value="700000" table:style-name="ce1">
            <text:p>700000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6">
            <text:p>VEHICLE MODELS</text:p>
          </table:table-cell>
          <table:table-cell office:value-type="string" table:style-name="ce7">
            <text:p>V7</text:p>
          </table:table-cell>
          <table:table-cell office:value-type="string" table:style-name="ce7">
            <text:p>VE</text:p>
          </table:table-cell>
          <table:table-cell office:value-type="float" office:value="700010" table:formula="of:=100000+[.E26]" table:style-name="ce8">
            <text:p>700010</text:p>
          </table:table-cell>
          <table:table-cell office:value-type="float" office:value="799999" table:formula="of:= [.I27]-1" table:style-name="ce6">
            <text:p>799999</text:p>
          </table:table-cell>
          <table:table-cell office:value-type="float" office:value="6" table:style-name="ce6">
            <text:p>6</text:p>
          </table:table-cell>
          <table:table-cell office:value-type="float" office:value="99990" table:formula="of:=([.F27]-[.E27])+1" table:style-name="ce8">
            <text:p>99990</text:p>
          </table:table-cell>
          <table:table-cell office:value-type="float" office:value="800000" table:style-name="ce6">
            <text:p>800000</text:p>
          </table:table-cell>
          <table:table-cell table:number-columns-repeated="16375" table:style-name="ce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<text:span text:style-name="T2">V1</text:span><text:s/>-<text:s/><text:span text:style-name="T2">M</text:span>YRMAX</text:p>
          </table:table-cell>
          <table:table-cell office:value-type="string" table:style-name="ce3">
            <text:p>VOM</text:p>
          </table:table-cell>
          <table:table-cell office:value-type="float" office:value="800010" table:formula="of:=100000+[.E27]" table:style-name="ce4">
            <text:p>800010</text:p>
          </table:table-cell>
          <table:table-cell office:value-type="float" office:value="899999" table:formula="of:= [.I28]-1" table:style-name="ce1">
            <text:p>8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8]-[.E28])+1" table:style-name="ce4">
            <text:p>99990</text:p>
          </table:table-cell>
          <table:table-cell office:value-type="float" office:value="900000" table:style-name="ce1">
            <text:p>900000</text:p>
          </table:table-cell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9 -<text:span text:style-name="T2">C</text:span>ISADA<text:s/><text:span text:style-name="T2">V</text:span>+</text:p>
          </table:table-cell>
          <table:table-cell office:value-type="string" table:style-name="ce3">
            <text:p>VCV</text:p>
          </table:table-cell>
          <table:table-cell office:value-type="float" office:value="900010" table:formula="of:=100000+[.E28]" table:style-name="ce4">
            <text:p>900010</text:p>
          </table:table-cell>
          <table:table-cell office:value-type="float" office:value="999999" table:formula="of:= [.I29]-1" table:style-name="ce1">
            <text:p>999999</text:p>
          </table:table-cell>
          <table:table-cell office:value-type="float" office:value="6" table:style-name="ce1">
            <text:p>6</text:p>
          </table:table-cell>
          <table:table-cell office:value-type="float" office:value="99990" table:formula="of:=([.F29]-[.E29])+1" table:style-name="ce4">
            <text:p>99990</text:p>
          </table:table-cell>
          <table:table-cell office:value-type="float" office:value="1000000" table:style-name="ce1">
            <text:p>1000000</text:p>
          </table:table-cell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VEHICLE MODELS</text:p>
          </table:table-cell>
          <table:table-cell office:value-type="string" table:style-name="ce3">
            <text:p>V10 -<text:s/><text:span text:style-name="T2">G</text:span>ROUND<text:s/><text:span text:style-name="T2">H</text:span>OG</text:p>
          </table:table-cell>
          <table:table-cell office:value-type="string" table:style-name="ce3">
            <text:p>VGH</text:p>
          </table:table-cell>
          <table:table-cell office:value-type="float" office:value="1000010" table:formula="of:=100000+[.E29]" table:style-name="ce4">
            <text:p>1000010</text:p>
          </table:table-cell>
          <table:table-cell office:value-type="float" office:value="1099999" table:formula="of:= [.I30]-1" table:style-name="ce1">
            <text:p>1099999</text:p>
          </table:table-cell>
          <table:table-cell office:value-type="float" office:value="7" table:style-name="ce1">
            <text:p>7</text:p>
          </table:table-cell>
          <table:table-cell office:value-type="float" office:value="99990" table:formula="of:=([.F30]-[.E30])+1" table:style-name="ce4">
            <text:p>99990</text:p>
          </table:table-cell>
          <table:table-cell office:value-type="float" office:value="1100000" table:style-name="ce1">
            <text:p>1100000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LASER CUTTING OS</text:p>
          </table:table-cell>
          <table:table-cell office:value-type="string" table:style-name="ce9">
            <text:p>VLC</text:p>
          </table:table-cell>
          <table:table-cell office:value-type="float" office:value="7000000" table:style-name="ce4">
            <text:p>7000000</text:p>
          </table:table-cell>
          <table:table-cell office:value-type="float" office:value="7999999" table:formula="of:= [.I31]-1" table:style-name="ce1">
            <text:p>7999999</text:p>
          </table:table-cell>
          <table:table-cell office:value-type="float" office:value="7" table:style-name="ce1">
            <text:p>7</text:p>
          </table:table-cell>
          <table:table-cell office:value-type="float" office:value="1000000" table:formula="of:=([.F31]-[.E31])+1" table:style-name="ce4">
            <text:p>1000000</text:p>
          </table:table-cell>
          <table:table-cell office:value-type="float" office:value="8000000" table:style-name="ce4">
            <text:p>8000000</text:p>
          </table:table-cell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C</text:span>USTOMER<text:s/><text:span text:style-name="T2">R</text:span>EQUIREMENT</text:p>
          </table:table-cell>
          <table:table-cell office:value-type="string" table:style-name="ce9">
            <text:p>VCR</text:p>
          </table:table-cell>
          <table:table-cell office:value-type="float" office:value="2000010" table:style-name="ce4">
            <text:p>2000010</text:p>
          </table:table-cell>
          <table:table-cell office:value-type="float" office:value="2999999" table:formula="of:= [.I32]-1" table:style-name="ce1">
            <text:p>2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32]-[.E32])+1" table:style-name="ce4">
            <text:p>999990</text:p>
          </table:table-cell>
          <table:table-cell office:value-type="float" office:value="3000000" table:style-name="ce1">
            <text:p>3000000</text:p>
          </table:table-cell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R</text:span>AW<text:s/><text:span text:style-name="T2">M</text:span>ATERIAL</text:p>
          </table:table-cell>
          <table:table-cell office:value-type="string" table:style-name="ce9">
            <text:p>VRM</text:p>
          </table:table-cell>
          <table:table-cell office:value-type="float" office:value="3000010" table:style-name="ce4">
            <text:p>3000010</text:p>
          </table:table-cell>
          <table:table-cell office:value-type="float" office:value="3999999" table:formula="of:= [.I33]-1" table:style-name="ce1">
            <text:p>3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33]-[.E33])+1" table:style-name="ce4">
            <text:p>999990</text:p>
          </table:table-cell>
          <table:table-cell office:value-type="float" office:value="4000000" table:style-name="ce1">
            <text:p>4000000</text:p>
          </table:table-cell>
          <table:table-cell table:number-columns-repeated="1637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O</text:span>UT<text:span text:style-name="T2">S</text:span>OURCE</text:p>
          </table:table-cell>
          <table:table-cell office:value-type="string" table:style-name="ce9">
            <text:p>VOS</text:p>
          </table:table-cell>
          <table:table-cell office:value-type="float" office:value="4000010" table:style-name="ce4">
            <text:p>4000010</text:p>
          </table:table-cell>
          <table:table-cell office:value-type="float" office:value="4999999" table:formula="of:= [.I34]-1" table:style-name="ce1">
            <text:p>4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34]-[.E34])+1" table:style-name="ce4">
            <text:p>999990</text:p>
          </table:table-cell>
          <table:table-cell office:value-type="float" office:value="5000000" table:style-name="ce1">
            <text:p>5000000</text:p>
          </table:table-cell>
          <table:table-cell table:number-columns-repeated="1637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PRODUCTION PROCESS</text:p>
          </table:table-cell>
          <table:table-cell office:value-type="string" table:style-name="ce3">
            <text:p><text:span text:style-name="T2">V</text:span>ELSON<text:s/><text:span text:style-name="T2">A</text:span>CCES<text:span text:style-name="T2">S</text:span>ORIES</text:p>
          </table:table-cell>
          <table:table-cell office:value-type="string" table:style-name="ce9">
            <text:p>VAC</text:p>
          </table:table-cell>
          <table:table-cell office:value-type="float" office:value="5000010" table:style-name="ce4">
            <text:p>5000010</text:p>
          </table:table-cell>
          <table:table-cell office:value-type="float" office:value="5999999" table:formula="of:= [.I35]-1" table:style-name="ce1">
            <text:p>5999999</text:p>
          </table:table-cell>
          <table:table-cell office:value-type="float" office:value="7" table:style-name="ce1">
            <text:p>7</text:p>
          </table:table-cell>
          <table:table-cell office:value-type="float" office:value="999990" table:formula="of:=([.F35]-[.E35])+1" table:style-name="ce4">
            <text:p>999990</text:p>
          </table:table-cell>
          <table:table-cell office:value-type="float" office:value="6000000" table:style-name="ce1">
            <text:p>6000000</text:p>
          </table:table-cell>
          <table:table-cell table:number-columns-repeated="16375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meta:initial-creator>V DESIGN</meta:initial-creator>
    <dc:creator>V DESIGN</dc:creator>
    <meta:creation-date>2025-05-28T07:21:18Z</meta:creation-date>
    <dc:date>2025-05-30T12:10:46Z</dc:date>
  </office:meta>
</office:document-meta>
</file>